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.6847in" fo:margin-left="0.5431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1.1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4382in" fo:margin-left="0.5354in" table:align="left"/>
    </style:style>
    <style:style style:name="Table2.A" style:family="table-column">
      <style:table-column-properties style:column-width="1.5618in"/>
    </style:style>
    <style:style style:name="Table2.B" style:family="table-column">
      <style:table-column-properties style:column-width="1.1229in"/>
    </style:style>
    <style:style style:name="Table2.C" style:family="table-column">
      <style:table-column-properties style:column-width="1.753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7" style:family="table-row">
      <style:table-row-properties style:min-row-height="0.225in"/>
    </style:style>
    <style:style style:name="Table3" style:family="table">
      <style:table-properties style:width="4.4382in" fo:margin-left="0.5354in" table:align="left"/>
    </style:style>
    <style:style style:name="Table3.A" style:family="table-column">
      <style:table-column-properties style:column-width="1.5618in"/>
    </style:style>
    <style:style style:name="Table3.B" style:family="table-column">
      <style:table-column-properties style:column-width="1.1229in"/>
    </style:style>
    <style:style style:name="Table3.C" style:family="table-column">
      <style:table-column-properties style:column-width="1.753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76c08" officeooo:paragraph-rsid="00176c08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76c08" officeooo:paragraph-rsid="00176c08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officeooo:rsid="0018c221" officeooo:paragraph-rsid="0018c221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officeooo:rsid="0018c221" officeooo:paragraph-rsid="001a5143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rsid="001a5143" officeooo:paragraph-rsid="001a5143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officeooo:rsid="001a5143" officeooo:paragraph-rsid="001a5143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rsid="001a9d05" officeooo:paragraph-rsid="001a9d05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officeooo:rsid="001a5143" officeooo:paragraph-rsid="001a5143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Times New Roman" officeooo:rsid="001c56d6" officeooo:paragraph-rsid="001c56d6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imes New Roman" officeooo:rsid="001d1335" officeooo:paragraph-rsid="001c56d6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Times New Roman" officeooo:rsid="001d6a13" officeooo:paragraph-rsid="001d6a13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24d852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Times New Roman" fo:font-size="12pt" officeooo:rsid="0026a95f" officeooo:paragraph-rsid="0026a95f" style:font-size-asian="12pt" style:font-size-complex="12pt"/>
    </style:style>
    <style:style style:name="T1" style:family="text">
      <style:text-properties officeooo:rsid="0018c221"/>
    </style:style>
    <style:style style:name="T2" style:family="text">
      <style:text-properties officeooo:rsid="0026a95f"/>
    </style:style>
    <style:style style:name="T3" style:family="text">
      <style:text-properties officeooo:rsid="0029bf13"/>
    </style:style>
    <style:style style:name="T4" style:family="text">
      <style:text-properties officeooo:rsid="002aa6c1"/>
    </style:style>
    <style:style style:name="T5" style:family="text">
      <style:text-properties officeooo:rsid="00242d1f"/>
    </style:style>
    <style:style style:name="T6" style:family="text">
      <style:text-properties officeooo:rsid="001a5143"/>
    </style:style>
    <style:style style:name="T7" style:family="text">
      <style:text-properties officeooo:rsid="001c4be6"/>
    </style:style>
    <style:style style:name="T8" style:family="text">
      <style:text-properties style:font-name="Times New Roman" officeooo:rsid="0024d852"/>
    </style:style>
    <style:style style:name="T9" style:family="text">
      <style:text-properties style:font-name="Times New Roman" fo:font-style="italic" officeooo:rsid="0024d852" style:font-style-asian="italic" style:font-style-complex="italic"/>
    </style:style>
    <style:style style:name="T10" style:family="text">
      <style:text-properties style:font-name="Times New Roman" fo:font-style="normal" officeooo:rsid="0024d852" style:font-style-asian="normal" style:font-style-complex="normal"/>
    </style:style>
    <style:style style:name="T11" style:family="text">
      <style:text-properties style:font-name="Times New Roman" fo:font-size="12pt" fo:font-weight="bold" style:font-size-asian="12pt" style:font-weight-asian="bold" style:font-size-complex="12pt"/>
    </style:style>
    <style:style style:name="T1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ATORY DATA ANALYSIS O<text:span text:style-name="T1">F</text:span></text:p>
      <text:p text:style-name="P1">‘RAW HOUSE DATA’</text:p>
      <text:p text:style-name="P1">SUMMARY</text:p>
      <text:p text:style-name="P1">John Steele</text:p>
      <text:p text:style-name="P1"/>
      <text:p text:style-name="P2">Given the data ‘raw_house_data.csv’ I have performed an EDA. <text:s/>I have removed outliers and filled in missing data as described further below. <text:s/>In addition, I have also plotted histograms, pair plots, heatmap, and box plots with the columns <text:span text:style-name="T2">containing numeric data</text:span>. <text:s/><text:span text:style-name="T3">I renamed the columns to more ‘user-friendly’ labels. <text:s/></text:span><text:span text:style-name="T1">I </text:span><text:span text:style-name="T3">then </text:span><text:span text:style-name="T1">saved this cleaned data to a new file. <text:s/></text:span><text:span text:style-name="T4">This presentation is directed towards other data scientist within my team who will be working on this data.</text:span></text:p>
      <text:p text:style-name="P2"/>
      <text:list text:style-name="L1">
        <text:list-item>
          <text:p text:style-name="P3">Used CoLab with Python and imported pandas, Seaborn, and Matplotlib Pyplot libraries.</text:p>
        </text:list-item>
        <text:list-item>
          <text:p text:style-name="P3">Checked for duplicates in the MLS column <text:span text:style-name="T5">but none were found.</text:span></text:p>
        </text:list-item>
        <text:list-item>
          <text:p text:style-name="P4">Removed <text:span text:style-name="T6">15 </text:span>outliers from the following (with amount<text:span text:style-name="T6">s</text:span>)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ot_acres</text:p>
          </table:table-cell>
          <table:table-cell table:style-name="Table1.B1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5">taxes</text:p>
          </table:table-cell>
          <table:table-cell table:style-name="Table1.B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bedrooms</text:p>
          </table:table-cell>
          <table:table-cell table:style-name="Table1.B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5">bathrooms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HOA</text:p>
          </table:table-cell>
          <table:table-cell table:style-name="Table1.B2" office:value-type="string">
            <text:p text:style-name="P5">5</text:p>
          </table:table-cell>
        </table:table-row>
      </table:table>
      <text:list text:style-name="L2">
        <text:list-header>
          <text:p text:style-name="P6"/>
        </text:list-header>
        <text:list-item>
          <text:p text:style-name="P6">Replaced nulls from the following (with amounts <text:span text:style-name="T7">and action</text:span>)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lot_acres</text:p>
          </table:table-cell>
          <table:table-cell table:style-name="Table2.A1" office:value-type="string">
            <text:p text:style-name="P5">10</text:p>
          </table:table-cell>
          <table:table-cell table:style-name="Table2.C1" office:value-type="string">
            <text:p text:style-name="P7">Replaced with mean.</text:p>
          </table:table-cell>
        </table:table-row>
        <table:table-row>
          <table:table-cell table:style-name="Table2.A2" office:value-type="string">
            <text:p text:style-name="P7">bathrooms</text:p>
          </table:table-cell>
          <table:table-cell table:style-name="Table2.A2" office:value-type="string">
            <text:p text:style-name="P7">6</text:p>
          </table:table-cell>
          <table:table-cell table:style-name="Table2.C2" office:value-type="string">
            <text:p text:style-name="P7">Replaced with mean.</text:p>
          </table:table-cell>
        </table:table-row>
        <table:table-row>
          <table:table-cell table:style-name="Table2.A2" office:value-type="string">
            <text:p text:style-name="P5">sqrt_ft</text:p>
          </table:table-cell>
          <table:table-cell table:style-name="Table2.A2" office:value-type="string">
            <text:p text:style-name="P5">54</text:p>
          </table:table-cell>
          <table:table-cell table:style-name="Table2.C2" office:value-type="string">
            <text:p text:style-name="P7">Replaced with mean.</text:p>
          </table:table-cell>
        </table:table-row>
        <table:table-row>
          <table:table-cell table:style-name="Table2.A2" office:value-type="string">
            <text:p text:style-name="P5">garage</text:p>
          </table:table-cell>
          <table:table-cell table:style-name="Table2.A2" office:value-type="string">
            <text:p text:style-name="P7">5</text:p>
          </table:table-cell>
          <table:table-cell table:style-name="Table2.C2" office:value-type="string">
            <text:p text:style-name="P7">Replaced with 0.</text:p>
          </table:table-cell>
        </table:table-row>
        <table:table-row>
          <table:table-cell table:style-name="Table2.A2" office:value-type="string">
            <text:p text:style-name="P5">kitchen_features</text:p>
          </table:table-cell>
          <table:table-cell table:style-name="Table2.A2" office:value-type="string">
            <text:p text:style-name="P5">33</text:p>
          </table:table-cell>
          <table:table-cell table:style-name="Table2.C2" office:value-type="string">
            <text:p text:style-name="P7">Replaced with ‘None’.</text:p>
          </table:table-cell>
        </table:table-row>
        <table:table-row>
          <table:table-cell table:style-name="Table2.A2" office:value-type="string">
            <text:p text:style-name="P5">floor_coverings</text:p>
          </table:table-cell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7">Replaced with ‘None’.</text:p>
          </table:table-cell>
        </table:table-row>
        <table:table-row table:style-name="Table2.7">
          <table:table-cell table:style-name="Table2.A2" office:value-type="string">
            <text:p text:style-name="P5">HOA</text:p>
          </table:table-cell>
          <table:table-cell table:style-name="Table2.A2" office:value-type="string">
            <text:p text:style-name="P5">557</text:p>
          </table:table-cell>
          <table:table-cell table:style-name="Table2.C2" office:value-type="string">
            <text:p text:style-name="P7">Replaced with -1.</text:p>
          </table:table-cell>
        </table:table-row>
      </table:table>
      <text:list text:style-name="L3">
        <text:list-header>
          <text:p text:style-name="P8"/>
        </text:list-header>
        <text:list-item>
          <text:p text:style-name="P8">Replaced zeros from the following (with amounts <text:span text:style-name="T7">and action</text:span>)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lot_acres</text:p>
          </table:table-cell>
          <table:table-cell table:style-name="Table3.A1" office:value-type="string">
            <text:p text:style-name="P5">35</text:p>
          </table:table-cell>
          <table:table-cell table:style-name="Table3.C1" office:value-type="string">
            <text:p text:style-name="P7">Replaced with mean.</text:p>
          </table:table-cell>
        </table:table-row>
        <table:table-row>
          <table:table-cell table:style-name="Table3.A2" office:value-type="string">
            <text:p text:style-name="P7">year_built</text:p>
          </table:table-cell>
          <table:table-cell table:style-name="Table3.A2" office:value-type="string">
            <text:p text:style-name="P7">5</text:p>
          </table:table-cell>
          <table:table-cell table:style-name="Table3.C2" office:value-type="string">
            <text:p text:style-name="P7">Replaced with mean.</text:p>
          </table:table-cell>
        </table:table-row>
      </table:table>
      <text:list text:style-name="L4">
        <text:list-header>
          <text:p text:style-name="P9"/>
        </text:list-header>
        <text:list-item>
          <text:p text:style-name="P9">After this cleaning of data I performed a ‘drop_duplicates’ action but none were dropped.</text:p>
        </text:list-item>
        <text:list-item>
          <text:p text:style-name="P10">Saved cleaned data to file ‘raw_house_data_cleaned.csv’.</text:p>
        </text:list-item>
        <text:list-item>
          <text:p text:style-name="P11">Renamed columns to more legible phrases for plots (ie, ‘sqrt_ft’ became ‘Square Footage’).</text:p>
        </text:list-item>
        <text:list-item>
          <text:p text:style-name="P12"><text:span text:style-name="T8">Created histograms, pair plots, heatmap, and boxplots for the following </text:span><text:span text:style-name="T9">except</text:span><text:span text:style-name="T10"> those in bold:<text:line-break/></text:span><text:span text:style-name="T11">MLS</text:span><text:span text:style-name="T12">, Sold Price, ZIP Code, Lot Acres, Taxes, Year Built, Bedrooms, Bathrooms, Square Footage, Garage, </text:span><text:span text:style-name="T11">Kitchen Features</text:span><text:span text:style-name="T12">, Fireplaces, </text:span><text:span text:style-name="T11">Floor Covering</text:span><text:span text:style-name="T12">, HOA</text:span></text:p>
        </text:list-item>
        <text:list-item>
          <text:p text:style-name="P13">Cleaned data saved to ‘raw_house_data_clean.csv’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 fo:text-align="center" style:justify-single-word="false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9:43:09.530892500</meta:creation-date>
    <dc:date>2025-03-24T11:54:39.933509600</dc:date>
    <meta:editing-duration>PT49M16S</meta:editing-duration>
    <meta:editing-cycles>14</meta:editing-cycles>
    <meta:generator>LibreOffice/25.2.0.3$Windows_X86_64 LibreOffice_project/e1cf4a87eb02d755bce1a01209907ea5ddc8f069</meta:generator>
    <meta:document-statistic meta:table-count="3" meta:image-count="0" meta:object-count="0" meta:page-count="1" meta:paragraph-count="55" meta:word-count="277" meta:character-count="1706" meta:non-whitespace-character-count="1489"/>
  </office:meta>
</office:document-meta>
</file>